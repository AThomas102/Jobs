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nova" svg:font-family="proxima-nova, helvetica, arial, sans-serif"/>
  </office:font-face-decls>
  <office:automatic-styles>
    <style:style style:name="P1" style:family="paragraph" style:parent-style-name="Standard">
      <style:text-properties officeooo:rsid="0002ad39" officeooo:paragraph-rsid="0002ad39"/>
    </style:style>
    <style:style style:name="P2" style:family="paragraph" style:parent-style-name="Standard" style:list-style-name="L2">
      <style:text-properties officeooo:rsid="0002ad39" officeooo:paragraph-rsid="0002ad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Dr. A. Asadi,</text:p>
      <text:p text:style-name="P1"/>
      <text:p text:style-name="P1">I am writing to recommend Andrew Thomas who has worked with me at CSA Catapult for a year as a Advanced Packaging Intern.</text:p>
      <text:p text:style-name="P1"/>
      <text:list text:style-name="L2">
        <text:list-item>
          <text:p text:style-name="P2">How did I contribute within the team?</text:p>
        </text:list-item>
        <text:list-item>
          <text:p text:style-name="P2">Did I have an interest in learning? Could you give an example?</text:p>
        </text:list-item>
        <text:list-item>
          <text:p text:style-name="P2">How did pickup the knowledge of material science while at CSA, e.g solder reflow profiles, use of a wirebonder and PCB design. My work creating an automated python GUI to run the RF testbench. My experience of doing to whole workflow, MIMIC diebonding, wire bonding all the way to characterization in the RF lab.</text:p>
        </text:list-item>
        <text:list-item>
          <text:p text:style-name="P2">Any detail about my analytical skills that I may have used. I cant remember very well what I did either!! Keeping good account of process parmaeters, e.g for wire bonding and die bonding.</text:p>
        </text:list-item>
      </text:list>
      <text:p text:style-name="P1"/>
      <text:p text:style-name="P1">Thanks,<text:line-break/>Yong Ling Ya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nova" svg:font-family="proxima-nova,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08:32:28.376721771</meta:creation-date>
    <dc:date>2024-11-29T12:55:40.368502564</dc:date>
    <meta:editing-duration>PT1M30S</meta:editing-duration>
    <meta:editing-cycles>1</meta:editing-cycles>
    <meta:document-statistic meta:table-count="0" meta:image-count="0" meta:object-count="0" meta:page-count="1" meta:paragraph-count="7" meta:word-count="141" meta:character-count="762" meta:non-whitespace-character-count="632"/>
    <meta:generator>LibreOffice/24.2.7.2$Linux_X86_64 LibreOffice_project/420$Build-2</meta:generator>
  </office:meta>
</office:document-meta>
</file>