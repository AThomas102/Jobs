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imbus Roman1"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svg:font-family="Oswald, Impact, 'Franklin Gothic Bold', system-ui, apple-system, BlinkMacSystemFont, 'Segoe UI', Roboto, Oxygen, Ubuntu, Cantarell, 'Droid Sans', 'Helvetica Neue', 'Fira Sans', sans-serif"/>
    <style:font-face style:name="TIMES" svg:font-family="TIMES" style:font-family-generic="roman"/>
    <style:font-face style:name="var artdeco-reset-typography-font-family-sans" svg:font-family="'var artdeco-reset-typography-font-family-sans'"/>
  </office:font-face-decls>
  <office:automatic-styles>
    <style:style style:name="P1" style:family="paragraph" style:parent-style-name="Standard">
      <style:paragraph-properties fo:margin-top="0cm" fo:margin-bottom="0cm" style:contextual-spacing="false" fo:line-height="115%" fo:text-align="start" style:justify-single-word="false"/>
      <style:text-properties style:font-name="Nimbus Roman" fo:font-size="12pt" fo:language="en" fo:country="GB" style:text-underline-style="none" officeooo:paragraph-rsid="000f1a56" style:font-size-asian="12pt" style:font-size-complex="12pt"/>
    </style:style>
    <style:style style:name="P2" style:family="paragraph" style:parent-style-name="Footer">
      <style:paragraph-properties fo:text-align="center" style:justify-single-word="false"/>
    </style:style>
    <style:style style:name="P3" style:family="paragraph" style:parent-style-name="Header">
      <style:paragraph-properties fo:text-align="center" style:justify-single-word="false"/>
    </style:style>
    <style:style style:name="P4" style:family="paragraph" style:parent-style-name="Standard">
      <style:paragraph-properties fo:margin-top="0.201cm" fo:margin-bottom="0.201cm" style:contextual-spacing="false" fo:line-height="115%" fo:text-align="start" style:justify-single-word="false"/>
      <style:text-properties style:font-name="Nimbus Roman" fo:font-size="12pt" fo:language="en" fo:country="GB" style:text-underline-style="none" officeooo:paragraph-rsid="000af013" style:font-size-asian="12pt" style:font-size-complex="12pt"/>
    </style:style>
    <style:style style:name="P5" style:family="paragraph" style:parent-style-name="Standard">
      <style:paragraph-properties fo:margin-top="0.302cm" fo:margin-bottom="0.302cm" style:contextual-spacing="false" fo:line-height="115%" fo:text-align="start" style:justify-single-word="false"/>
      <style:text-properties style:font-name="Nimbus Roman" fo:font-size="12pt" fo:language="en" fo:country="GB" style:text-underline-style="none" officeooo:paragraph-rsid="001c6cf2" style:font-size-asian="12pt" style:font-size-complex="12pt"/>
    </style:style>
    <style:style style:name="P6" style:family="paragraph" style:parent-style-name="Standard">
      <style:paragraph-properties fo:margin-top="0cm" fo:margin-bottom="0cm" style:contextual-spacing="false" fo:line-height="115%" fo:text-align="start" style:justify-single-word="false"/>
      <style:text-properties style:font-name="Nimbus Roman" fo:font-size="12pt" fo:language="en" fo:country="GB" style:text-underline-style="none" officeooo:paragraph-rsid="001c6cf2" style:font-size-asian="12pt" style:font-size-complex="12pt"/>
    </style:style>
    <style:style style:name="P7" style:family="paragraph" style:parent-style-name="Standard">
      <style:paragraph-properties fo:margin-top="0.201cm" fo:margin-bottom="0.201cm" style:contextual-spacing="false" fo:line-height="115%" fo:text-align="start" style:justify-single-word="false"/>
      <style:text-properties style:font-name="Nimbus Roman" fo:font-size="12pt" fo:language="en" fo:country="GB" style:text-underline-style="none" officeooo:paragraph-rsid="000f1a56" style:font-size-asian="12pt" style:font-size-complex="12pt"/>
    </style:style>
    <style:style style:name="P8" style:family="paragraph" style:parent-style-name="Standard">
      <style:paragraph-properties fo:margin-top="0.302cm" fo:margin-bottom="0.302cm" style:contextual-spacing="false" fo:line-height="115%" fo:text-align="start" style:justify-single-word="false"/>
      <style:text-properties style:font-name="Nimbus Roman" fo:font-size="12pt" fo:language="en" fo:country="GB" style:text-underline-style="none" officeooo:paragraph-rsid="000f1a56" style:font-size-asian="12pt" style:font-size-complex="12pt"/>
    </style:style>
    <style:style style:name="P9" style:family="paragraph" style:parent-style-name="Standard">
      <style:paragraph-properties fo:margin-top="0.302cm" fo:margin-bottom="0.302cm" style:contextual-spacing="false" fo:line-height="115%" fo:text-align="start" style:justify-single-word="false"/>
      <style:text-properties officeooo:paragraph-rsid="001c6cf2"/>
    </style:style>
    <style:style style:name="P10" style:family="paragraph" style:parent-style-name="Standard">
      <style:paragraph-properties fo:margin-top="0.201cm" fo:margin-bottom="0.201cm" style:contextual-spacing="false" fo:line-height="115%" fo:text-align="start" style:justify-single-word="false"/>
      <style:text-properties officeooo:paragraph-rsid="001c6cf2"/>
    </style:style>
    <style:style style:name="P11" style:family="paragraph" style:parent-style-name="Standard">
      <style:paragraph-properties fo:margin-top="0cm" fo:margin-bottom="0cm" style:contextual-spacing="false" fo:line-height="115%" fo:text-align="start" style:justify-single-word="false"/>
      <style:text-properties officeooo:paragraph-rsid="001c6cf2"/>
    </style:style>
    <style:style style:name="P12" style:family="paragraph" style:parent-style-name="Standard">
      <style:paragraph-properties fo:margin-top="0cm" fo:margin-bottom="0cm" style:contextual-spacing="false" fo:line-height="115%" fo:text-align="start" style:justify-single-word="false"/>
      <style:text-properties officeooo:paragraph-rsid="001de4d7"/>
    </style:style>
    <style:style style:name="T1" style:family="text">
      <style:text-properties officeooo:rsid="000af013"/>
    </style:style>
    <style:style style:name="T2" style:family="text">
      <style:text-properties officeooo:rsid="000f1a56"/>
    </style:style>
    <style:style style:name="T3" style:family="text">
      <style:text-properties officeooo:rsid="0012a18c"/>
    </style:style>
    <style:style style:name="T4" style:family="text">
      <style:text-properties officeooo:rsid="0014eb48"/>
    </style:style>
    <style:style style:name="T5" style:family="text">
      <style:text-properties style:font-name="Nimbus Roman" fo:font-size="12pt" fo:language="en" fo:country="GB" style:text-underline-style="none" officeooo:rsid="0014eb48" style:font-size-asian="12pt" style:font-size-complex="12pt"/>
    </style:style>
    <style:style style:name="T6" style:family="text">
      <style:text-properties style:font-name="Nimbus Roman" fo:font-size="12pt" fo:language="en" fo:country="GB" style:text-underline-style="none" officeooo:rsid="00132018" style:font-size-asian="12pt" style:font-size-complex="12pt"/>
    </style:style>
    <style:style style:name="T7" style:family="text">
      <style:text-properties style:font-name="Nimbus Roman" fo:font-size="12pt" fo:language="en" fo:country="GB" style:text-underline-style="none" officeooo:rsid="001de4d7" style:font-size-asian="12pt" style:font-size-complex="12pt"/>
    </style:style>
    <style:style style:name="T8" style:family="text">
      <style:text-properties style:font-name="Nimbus Roman" fo:font-size="12pt" fo:language="en" fo:country="GB" style:text-underline-style="none" fo:font-weight="bold" officeooo:rsid="0014eb48" style:font-size-asian="12pt" style:font-weight-asian="bold" style:font-size-complex="12pt" style:font-weight-complex="bold"/>
    </style:style>
    <style:style style:name="T9" style:family="text">
      <style:text-properties style:font-name="Nimbus Roman" fo:font-size="12pt" fo:language="en" fo:country="GB" style:text-underline-style="none" fo:font-weight="normal" officeooo:rsid="0014eb48" style:font-size-asian="12pt" style:font-weight-asian="normal" style:font-size-complex="12pt" style:font-weight-complex="normal"/>
    </style:style>
    <style:style style:name="T10" style:family="text">
      <style:text-properties fo:font-weight="normal" style:font-weight-asian="normal" style:font-weight-complex="normal"/>
    </style:style>
    <style:style style:name="T11" style:family="text">
      <style:text-properties officeooo:rsid="001c6cf2"/>
    </style:style>
    <style:style style:name="T12" style:family="text">
      <style:text-properties fo:font-weight="bold" style:font-weight-asian="bold" style:font-weight-complex="bold"/>
    </style:style>
    <style:style style:name="T13" style:family="text">
      <style:text-properties officeooo:rsid="001de4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line-break/>Dear Dr A. Asadi</text:p>
      <text:p text:style-name="P1">I am writing to you to apply for the PhD position in Robust Machine Learning for 6G mmWave. I am a 5G engineer working at Accelercomm on the implementation of a power efficient 5G physical layer for use in a satellite direct to device applications.</text:p>
      <text:p text:style-name="P8">I am particularly interested in developing my skills in the areas surrounding this PhD, for example in the use of state of the art machine learning developments on increasing both spectrum efficiency while also having the potential to reduce power costs on the ground at base stations. These developments also allow for better quality of service for the end user, which I believe is a challenge worth addressing. At TU Delft, in the WISE lab, there would be a significant step up in the cutting edge communications equipment available to me. But by far the most important aspect for me would be working with fellow researchers and academic staff whom I relish the opportunity to learn from. I believe my personal experience would allow be to fit well in this position. I have been working at Accelercomm for over a year, and I have learnt a great amount in that time. I have working on improving estimation algorithms and developing a channel processing test framework. I am most proud of this work due to how it has aided my colleagues in helping solve problems and drive development on the channel processing faster than was previously possible. This framework has allowed us to test various spectrum resource allocations in a lower level manner so we can determine accurate performance metrics, for example in a high load scenario using PUSCH with a 64QAM modulation scheme at the maximum number of resource blocks.</text:p>
      <text:p text:style-name="P7">At Lancaster University I investigated the work of metal contacts for zinc oxide thin film transistors. This involved creating zinc oxide with spray pyrolysis and depositing metal contacts by physical vapour deposition. I then investigated the electrical characteristics of the transistors. This was my first experience doing research in an academic setting. I found this period very demanding, but this period of my studies the most demanding by far, however I learnt the most during this period about research. I found that even if things were not going right and everything seemed to be going wrong, perseverance was essential in order to reap the benefits of the work. <text:span text:style-name="T1">Unfortunately my lectures were not able to get back to me in time before I was able to submit this application. I have attached </text:span><text:span text:style-name="T2">the</text:span><text:span text:style-name="T1"> contact details </text:span><text:span text:style-name="T2">for each of them </text:span><text:span text:style-name="T1">below if you would </text:span><text:span text:style-name="T2">like </text:span><text:span text:style-name="T1">further detail about my </text:span><text:span text:style-name="T2">s</text:span><text:span text:style-name="T1">tudies at Lancaster University.</text:span></text:p>
      <text:p text:style-name="P5">As a PhD researcher at the WISE lab I would want to investigate how the cutting edge research into deep learning and and reinforcement learning can be used in the determination of channel state <text:span text:style-name="T3">information</text:span>. I would want to do this in manner that meets the low power requirements in terrestrial networks while <text:span text:style-name="T2">having an </text:span>improved quality of service. <text:span text:style-name="T2">I would</text:span> investigat<text:span text:style-name="T2">e </text:span>the potential use of low power embedded hardware to run reinforcement learning based models for channel estimation in a semi-passive Reconfigurable Intelligent Surface <text:span text:style-name="T2">within the </text:span>6G mmWave <text:span text:style-name="T2">frequency spectrum</text:span>. </text:p>
      <text:p text:style-name="P6"/>
      <text:p text:style-name="P11"><text:soft-page-break/><text:span text:style-name="T5"/></text:p>
      <text:p text:style-name="P12"><text:span text:style-name="T5">Dr Graeme Burt supervised me during my </text:span><text:span text:style-name="T7">masters studies at Lancaster working on</text:span><text:span text:style-name="T5"> RF antenna design </text:span><text:span text:style-name="T7">optimization</text:span><text:span text:style-name="T5">.<text:line-break/></text:span><text:a xlink:type="simple" xlink:href="mailto:g.burt1@lancaster.ac.uk" text:style-name="Internet_20_link" text:visited-style-name="Visited_20_Internet_20_Link">g.burt1@lancaster.ac.uk</text:a><text:span text:style-name="T9"><text:line-break/>+44 (0)1524 592177</text:span></text:p>
      <text:p text:style-name="P9"><text:span text:style-name="T5">Dr Riccardo Degl'Innocenti supervised me during my </text:span><text:span text:style-name="T7">masters studies at Lancaster</text:span><text:span text:style-name="T5"> with the investigation of </text:span>THz generation <text:span text:style-name="T4">using</text:span> <text:span text:style-name="T4">photoconductive </text:span>antennas.<text:line-break/><text:a xlink:type="simple" xlink:href="mailto:r.deglinnocenti@qmul.ac.uk" text:style-name="Internet_20_link" text:visited-style-name="Visited_20_Internet_20_Link"><text:span text:style-name="T10">r.deglinnocenti@qmul.ac.uk</text:span></text:a></text:p>
      <text:p text:style-name="P10"><text:span text:style-name="T11">Dr </text:span>Jayakrishnan Chandrappan <text:span text:style-name="T11">was my manager in the Advanced Packaging department at CSA Catapult </text:span><text:span text:style-name="T13">during my year long internship with the company</text:span><text:span text:style-name="T11">.</text:span><text:line-break/><text:a xlink:type="simple" xlink:href="mailto:jayakrishnan.chandrappan@csa.catapult.org.uk" text:style-name="Internet_20_link" text:visited-style-name="Visited_20_Internet_20_Link"><text:span text:style-name="T10">jayakrishnan.chandrappan@csa.catapult.org.uk</text:span></text:a><text:span text:style-name="T6"><text:line-break/><text:line-break/>Kinds Regards<text:line-break/>Andrew Thomas<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imbus Roman1"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svg:font-family="Oswald, Impact, 'Franklin Gothic Bold', system-ui, apple-system, BlinkMacSystemFont, 'Segoe UI', Roboto, Oxygen, Ubuntu, Cantarell, 'Droid Sans', 'Helvetica Neue', 'Fira Sans', sans-serif"/>
    <style:font-face style:name="TIMES" svg:font-family="TIMES" style:font-family-generic="roman"/>
    <style:font-face style:name="var artdeco-reset-typography-font-family-sans" svg:font-family="'var artdeco-reset-typography-font-family-san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imbus Roman1"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1"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imbus Roman1" fo:font-family="'Nimbus Roman'"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number:date-style style:name="N41" number:automatic-order="true">
      <number:day/>
      <number:text> </number:text>
      <number:month number:style="long" number:textual="true"/>
      <number:text> </number:text>
      <number:year number:style="long"/>
    </number:date-style>
  </office:automatic-styles>
  <office:master-styles>
    <style:master-page style:name="Standard" style:page-layout-name="Mpm1" draw:style-name="Mdp1">
      <style:header>
        <text:p text:style-name="MP1"><text:tab/><text:tab/><text:date style:data-style-name="N41" text:date-value="2024-11-30T18:09:37.397493668" text:fixed="true">30 November 2024</text:date></text:p>
      </style:header>
      <style:footer>
        <text:p text:style-name="MP2"><text:bookmark-start text:name="PageNumWizard_FOOTER_Default Page Style1 Copy 1"/><text:page-number text:select-page="current">2</text:page-number><text:bookmark-end text:name="PageNumWizard_FOOTER_Default Page Style1 Copy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30T16:37:32.107526688</meta:creation-date>
    <meta:generator>LibreOffice/24.2.7.2$Linux_X86_64 LibreOffice_project/420$Build-2</meta:generator>
    <dc:date>2024-11-30T19:34:26.262753859</dc:date>
    <meta:editing-duration>PT1H26M19S</meta:editing-duration>
    <meta:editing-cycles>9</meta:editing-cycles>
    <meta:document-statistic meta:table-count="0" meta:image-count="0" meta:object-count="0" meta:page-count="2" meta:paragraph-count="10" meta:word-count="603" meta:character-count="3740" meta:non-whitespace-character-count="3141"/>
  </office:meta>
</office:document-meta>
</file>