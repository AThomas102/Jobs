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roxima-nova" svg:font-family="proxima-nova, helvetica, arial, sans-serif"/>
  </office:font-face-decls>
  <office:automatic-styles>
    <style:style style:name="P1" style:family="paragraph" style:parent-style-name="Standard">
      <style:text-properties officeooo:rsid="0002ad39" officeooo:paragraph-rsid="0002ad39"/>
    </style:style>
    <style:style style:name="P2" style:family="paragraph" style:parent-style-name="Standard" style:list-style-name="L2">
      <style:text-properties officeooo:rsid="0002ad39" officeooo:paragraph-rsid="0002ad39"/>
    </style:style>
    <style:style style:name="P3" style:family="paragraph" style:parent-style-name="Standard" style:list-style-name="L2">
      <style:text-properties officeooo:rsid="00068047" officeooo:paragraph-rsid="00068047"/>
    </style:style>
    <style:style style:name="T1" style:family="text">
      <style:text-properties officeooo:rsid="00068047"/>
    </style:style>
    <style:style style:name="T2" style:family="text">
      <style:text-properties officeooo:rsid="00069aa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Dr. A. Asadi,</text:p>
      <text:p text:style-name="P1"/>
      <text:p text:style-name="P1">I am writing to recommend Andrew Thomas .. <text:span text:style-name="T1">at Accelercomm</text:span></text:p>
      <text:p text:style-name="P1"/>
      <text:list text:style-name="L2">
        <text:list-item>
          <text:p text:style-name="P2">How <text:span text:style-name="T1">have</text:span> I contribute<text:span text:style-name="T1">d and colaborated </text:span>within the team?</text:p>
        </text:list-item>
        <text:list-item>
          <text:p text:style-name="P3">How have I applied my analytical skills, e.g matlab code implementation for TA. Equalizer and estimator.</text:p>
        </text:list-item>
        <text:list-item>
          <text:p text:style-name="P3">Code competance e.g creation of the channel tests for all channels. C CPP groovy python etc.</text:p>
        </text:list-item>
        <text:list-item>
          <text:p text:style-name="P3">In depth understand<text:span text:style-name="T2">ing</text:span> of the physical layer spec for many channels. Aswell as nfapi and O-RAN.</text:p>
        </text:list-item>
        <text:list-item>
          <text:p text:style-name="P3">And please add anything else you think could be applicable!</text:p>
          <text:p text:style-name="P3"/>
          <text:p text:style-name="P2"/>
        </text:list-item>
      </text:list>
      <text:p text:style-name="P1">Thanks,<text:line-break/><text:span text:style-name="T1">Shide Wang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roxima-nova" svg:font-family="proxima-nova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08:32:28.376721771</meta:creation-date>
    <dc:date>2024-11-29T16:01:58.204754298</dc:date>
    <meta:editing-duration>PT3H7M47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91" meta:character-count="505" meta:non-whitespace-character-count="429"/>
  </office:meta>
</office:document-meta>
</file>